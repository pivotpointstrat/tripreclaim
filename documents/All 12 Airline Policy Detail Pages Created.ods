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#</text:p>
          </table:table-cell>
          <table:table-cell office:value-type="string">
            <text:p>Airline</text:p>
          </table:table-cell>
          <table:table-cell office:value-type="string">
            <text:p>Path</text:p>
          </table:table-cell>
          <table:table-cell office:value-type="string">
            <text:p>Lines</text:p>
          </table:table-cell>
          <table:table-cell office:value-type="string">
            <text:p>DOT 24h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merican Airlines</text:p>
          </table:table-cell>
          <table:table-cell office:value-type="string">
            <text:p>`/policies/american-airlines/`</text:p>
          </table:table-cell>
          <table:table-cell office:value-type="float" office:value="169">
            <text:p>169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elta Air Lines</text:p>
          </table:table-cell>
          <table:table-cell office:value-type="string">
            <text:p>`/policies/delta-air-lines/`</text:p>
          </table:table-cell>
          <table:table-cell office:value-type="float" office:value="166">
            <text:p>166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United Airlines</text:p>
          </table:table-cell>
          <table:table-cell office:value-type="string">
            <text:p>`/policies/united-airlines/`</text:p>
          </table:table-cell>
          <table:table-cell office:value-type="float" office:value="161">
            <text:p>161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outhwest Airlines</text:p>
          </table:table-cell>
          <table:table-cell office:value-type="string">
            <text:p>`/policies/southwest-airlines/`</text:p>
          </table:table-cell>
          <table:table-cell office:value-type="float" office:value="159">
            <text:p>159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etBlue Airways</text:p>
          </table:table-cell>
          <table:table-cell office:value-type="string">
            <text:p>`/policies/jetblue-airways/`</text:p>
          </table:table-cell>
          <table:table-cell office:value-type="float" office:value="162">
            <text:p>162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laska Airlines</text:p>
          </table:table-cell>
          <table:table-cell office:value-type="string">
            <text:p>`/policies/alaska-airlines/`</text:p>
          </table:table-cell>
          <table:table-cell office:value-type="float" office:value="158">
            <text:p>158</text:p>
          </table:table-cell>
          <table:table-cell office:value-type="string">
            <text:p>✅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ritish Airways</text:p>
          </table:table-cell>
          <table:table-cell office:value-type="string">
            <text:p>`/policies/british-airways/`</text:p>
          </table:table-cell>
          <table:table-cell office:value-type="float" office:value="161">
            <text:p>161</text:p>
          </table:table-cell>
          <table:table-cell office:value-type="string">
            <text:p>—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Lufthansa</text:p>
          </table:table-cell>
          <table:table-cell office:value-type="string">
            <text:p>`/policies/lufthansa/`</text:p>
          </table:table-cell>
          <table:table-cell office:value-type="float" office:value="162">
            <text:p>162</text:p>
          </table:table-cell>
          <table:table-cell office:value-type="string">
            <text:p>—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Qatar Airways</text:p>
          </table:table-cell>
          <table:table-cell office:value-type="string">
            <text:p>`/policies/qatar-airways/`</text:p>
          </table:table-cell>
          <table:table-cell office:value-type="float" office:value="162">
            <text:p>162</text:p>
          </table:table-cell>
          <table:table-cell office:value-type="string">
            <text:p>—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Singapore Airlines</text:p>
          </table:table-cell>
          <table:table-cell office:value-type="string">
            <text:p>`/policies/singapore-airlines/`</text:p>
          </table:table-cell>
          <table:table-cell office:value-type="float" office:value="163">
            <text:p>163</text:p>
          </table:table-cell>
          <table:table-cell office:value-type="string">
            <text:p>—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athay Pacific</text:p>
          </table:table-cell>
          <table:table-cell office:value-type="string">
            <text:p>`/policies/cathay-pacific/`</text:p>
          </table:table-cell>
          <table:table-cell office:value-type="float" office:value="165">
            <text:p>165</text:p>
          </table:table-cell>
          <table:table-cell office:value-type="string">
            <text:p>—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Air Canada</text:p>
          </table:table-cell>
          <table:table-cell office:value-type="string">
            <text:p>`/policies/air-canada/`</text:p>
          </table:table-cell>
          <table:table-cell office:value-type="float" office:value="164">
            <text:p>164</text:p>
          </table:table-cell>
          <table:table-cell office:value-type="string">
            <text:p>✅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